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00%"/>
      <style:text-properties officeooo:rsid="0007a8d9" officeooo:paragraph-rsid="0007a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йт для продвижения услуги разработки TG ботов</text:p>
      <text:p text:style-name="P1"/>
      <text:p text:style-name="P1">1. Страницы</text:p>
      <text:p text:style-name="P1">- Главная</text:p>
      <text:p text:style-name="P1">- Преимущества</text:p>
      <text:p text:style-name="P1">- Этапы разработки</text:p>
      <text:p text:style-name="P1">- Решения</text:p>
      <text:p text:style-name="P1">- Контакты</text:p>
      <text:p text:style-name="P1"/>
      <text:p text:style-name="P1">2. О чем страница</text:p>
      <text:p text:style-name="P1">2.1 Главная</text:p>
      <text:p text:style-name="P1">Основное коммерческое предложение</text:p>
      <text:p text:style-name="P1">Базовые характеристики / параметры предложения</text:p>
      <text:p text:style-name="P1"/>
      <text:p text:style-name="P1">2.2 Преимущества – преимущества использования бота</text:p>
      <text:p text:style-name="P1">- Автоматизация бизнес процессов</text:p>
      <text:p text:style-name="P1">- Повышение лояльности</text:p>
      <text:p text:style-name="P1">- Интеграции</text:p>
      <text:p text:style-name="P1">- Аналитика</text:p>
      <text:p text:style-name="P1"/>
      <text:p text:style-name="P1">2.3 Этапы разработки</text:p>
      <text:p text:style-name="P1">- Определение целей и задач</text:p>
      <text:p text:style-name="P1">- Разработка и согласование ТЗ, КП, стоимости</text:p>
      <text:p text:style-name="P1">- Процесс разработки и тестирования</text:p>
      <text:p text:style-name="P1">- Приемо-сдаточные испытания</text:p>
      <text:p text:style-name="P1">- Деплой</text:p>
      <text:p text:style-name="P1"/>
      <text:p text:style-name="P1">2.4 Решения</text:p>
      <text:p text:style-name="P1">- примеры ботов и mini App с описанием</text:p>
      <text:p text:style-name="P1"/>
      <text:p text:style-name="P1">2.5 Контакты</text:p>
      <text:p text:style-name="P1">- кнопка</text:p>
      <text:p text:style-name="P1">- контакты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20:05:20.345230510</meta:creation-date>
    <dc:date>2026-04-04T21:45:56.471356021</dc:date>
    <meta:editing-duration>PT54M55S</meta:editing-duration>
    <meta:editing-cycles>1</meta:editing-cycles>
    <meta:document-statistic meta:table-count="0" meta:image-count="0" meta:object-count="0" meta:page-count="1" meta:paragraph-count="27" meta:word-count="91" meta:character-count="594" meta:non-whitespace-character-count="529"/>
    <meta:generator>LibreOffice/24.2.7.2$Linux_X86_64 LibreOffice_project/420$Build-2</meta:generator>
  </office:meta>
</office:document-meta>
</file>